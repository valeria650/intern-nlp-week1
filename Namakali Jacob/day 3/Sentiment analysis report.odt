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396in" table:align="left"/>
    </style:style>
    <style:style style:name="Table1.A" style:family="table-column">
      <style:table-column-properties style:column-width="1.8056in"/>
    </style:style>
    <style:style style:name="Table1.B" style:family="table-column">
      <style:table-column-properties style:column-width="0.7486in"/>
    </style:style>
    <style:style style:name="Table1.C" style:family="table-column">
      <style:table-column-properties style:column-width="0.7278in"/>
    </style:style>
    <style:style style:name="Table1.D" style:family="table-column">
      <style:table-column-properties style:column-width="0.5319in"/>
    </style:style>
    <style:style style:name="Table1.E" style:family="table-column">
      <style:table-column-properties style:column-width="0.725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center" style:justify-single-word="false"/>
      <style:text-properties officeooo:rsid="00015881" officeooo:paragraph-rsid="00015881"/>
    </style:style>
    <style:style style:name="P2" style:family="paragraph" style:parent-style-name="Text_20_body">
      <style:paragraph-properties fo:text-align="center" style:justify-single-word="false"/>
      <style:text-properties officeooo:rsid="00015881" officeooo:paragraph-rsid="00015881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style:contextual-spacing="false" fo:text-align="left" style:justify-single-word="false"/>
    </style:style>
    <style:style style:name="P5" style:family="paragraph" style:parent-style-name="Text_20_body">
      <style:paragraph-properties fo:text-align="left" style:justify-single-word="fals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able_20_Heading">
      <style:paragraph-properties fo:text-align="left" style:justify-single-word="false"/>
    </style:style>
    <style:style style:name="P8" style:family="paragraph" style:parent-style-name="Table_20_Contents">
      <style:paragraph-properties fo:text-align="lef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USITEMA UNIVERSITY ARTIFICIAL INTELLIGENCE INTERDISCIPLINARY RESEARCH GROUP</text:h>
      <text:p text:style-name="P2">NAMAKALI JACOB</text:p>
      <text:h text:style-name="P3" text:outline-level="1">Sentiment Analysis with Classical Machine Learning Models: Project Report</text:h>
      <text:h text:style-name="Heading_20_2" text:outline-level="2">Introduction</text:h>
      <text:p text:style-name="Text_20_body">This report summarizes a sentiment analysis project focused on training and comparing various classical machine learning models on a text dataset. The primary goal is to classify movie reviews as either positive or negative, demonstrating the end-to-end process from data acquisition to model evaluation.</text:p>
      <text:h text:style-name="Heading_20_2" text:outline-level="2">Data Loading</text:h>
      <text:p text:style-name="Text_20_body">The project utilized the IMDB movie reviews dataset, a widely recognized benchmark for binary sentiment classification. The dataset was directly downloaded from the Stanford University archive (<text:span text:style-name="Source_20_Text">http://ai.stanford.edu/~amaas/data/sentiment/aclImdb_v1.tar.gz</text:span>) and extracted locally. This dataset comprises 50,000 movie reviews, equally split into training and testing sets, each containing 25,000 samples. Each review is accompanied by a binary label: 0 for negative sentiment and 1 for positive sentiment.</text:p>
      <text:p text:style-name="Text_20_body">Upon loading, the data was shuffled to ensure randomness in the training and testing sets.</text:p>
      <text:h text:style-name="Heading_20_2" text:outline-level="2">Data Preprocessing</text:h>
      <text:p text:style-name="Text_20_body">To prepare the raw text data for machine learning algorithms, a series of preprocessing steps were applied:</text:p>
      <text:p text:style-name="P4"><text:span text:style-name="Strong_20_Emphasis">Lowercasing</text:span>: All text was converted to lowercase to ensure consistency. </text:p>
      <text:p text:style-name="P4"><text:span text:style-name="Strong_20_Emphasis">HTML Tag Removal</text:span>: HTML tags, such as <text:span text:style-name="Source_20_Text">&lt;br /&gt;</text:span>, were removed from the reviews. </text:p>
      <text:p text:style-name="P4"><text:span text:style-name="Strong_20_Emphasis">Punctuation Removal</text:span>: Punctuation marks were stripped from the text. </text:p>
      <text:p text:style-name="P4"><text:span text:style-name="Strong_20_Emphasis">Tokenization</text:span>: Reviews were broken down into individual words (tokens) using NLTK's word tokenizer. </text:p>
      <text:p text:style-name="P4"><text:span text:style-name="Strong_20_Emphasis">Stop Word Removal</text:span>: Common English stop words (e.g., 'the', 'is', 'a') were removed to reduce noise and focus on meaningful terms. </text:p>
      <text:p text:style-name="P5"><text:soft-page-break/><text:span text:style-name="Strong_20_Emphasis">Stemming</text:span>: Words were reduced to their root form using the Porter Stemmer (e.g., 'running' -&gt; 'run', 'studies' -&gt; 'studi'). </text:p>
      <text:p text:style-name="Text_20_body">These steps transformed the raw reviews into a cleaner, more standardized format suitable for feature extraction.</text:p>
      <text:h text:style-name="Heading_20_2" text:outline-level="2">Feature Extraction</text:h>
      <text:p text:style-name="Text_20_body">After preprocessing, the text data needed to be converted into numerical feature vectors. This was achieved using <text:span text:style-name="Strong_20_Emphasis">TF-IDF (Term Frequency-Inverse Document Frequency)</text:span>. TF-IDF is a statistical measure that reflects how important a word is to a document in a collection or corpus.</text:p>
      <text:p text:style-name="Text_20_body">The <text:span text:style-name="Source_20_Text">TfidfVectorizer</text:span> was initialized with <text:span text:style-name="Source_20_Text">max_features=10000</text:span>, <text:span text:style-name="Source_20_Text">min_df=5</text:span>, and <text:span text:style-name="Source_20_Text">max_df=0.8</text:span>. This configuration ensures that only the 10,000 most relevant features (words/n-grams) are considered, and words appearing in fewer than 5 documents or more than 80% of the documents are ignored (as they are likely too rare or too common to be discriminative).</text:p>
      <text:p text:style-name="Text_20_body">The vectorizer was fitted on the training data and then used to transform both the training and test sets, resulting in feature matrices of shape (25000, 10000) for both <text:span text:style-name="Source_20_Text">X_train_features</text:span> and <text:span text:style-name="Source_20_Text">X_test_features</text:span>.</text:p>
      <text:h text:style-name="Heading_20_2" text:outline-level="2">Model Training and Evaluation</text:h>
      <text:p text:style-name="Text_20_body">Several classical machine learning models commonly used for text classification were trained and evaluated on the extracted TF-IDF features. The following models were chosen:</text:p>
      <text:p text:style-name="P6"><text:span text:style-name="Strong_20_Emphasis">Logistic Regression</text:span> </text:p>
      <text:p text:style-name="P6"><text:span text:style-name="Strong_20_Emphasis">Multinomial Naive Bayes</text:span> </text:p>
      <text:p text:style-name="P6"><text:span text:style-name="Strong_20_Emphasis">Linear Support Vector Classifier (SVC)</text:span> </text:p>
      <text:p text:style-name="Text_20_body"><text:span text:style-name="Strong_20_Emphasis">Decision Tree Classifier</text:span> </text:p>
      <text:p text:style-name="Text_20_body">Each model was trained on the <text:span text:style-name="Source_20_Text">X_train_features</text:span> and <text:span text:style-name="Source_20_Text">y_train</text:span> datasets and then evaluated on the <text:span text:style-name="Source_20_Text">X_test_features</text:span> and <text:span text:style-name="Source_20_Text">y_test</text:span> datasets. The performance metrics used for evaluation were Accuracy, Precision, Recall, and F1-Score.</text:p>
      <text:h text:style-name="Heading_20_3" text:outline-level="3">Model Performance Summary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7">Model</text:p>
            </table:table-cell>
            <table:table-cell table:style-name="Table1.A1" office:value-type="string">
              <text:p text:style-name="P7">Accuracy</text:p>
            </table:table-cell>
            <table:table-cell table:style-name="Table1.A1" office:value-type="string">
              <text:p text:style-name="P7">Precision</text:p>
            </table:table-cell>
            <table:table-cell table:style-name="Table1.A1" office:value-type="string">
              <text:p text:style-name="P7">Recall</text:p>
            </table:table-cell>
            <table:table-cell table:style-name="Table1.A1" office:value-type="string">
              <text:p text:style-name="P7">F1 Score</text:p>
            </table:table-cell>
          </table:table-row>
        </table:table-header-rows>
        <table:table-row>
          <table:table-cell table:style-name="Table1.A1" office:value-type="string">
            <text:p text:style-name="P8">Logistic Regression</text:p>
          </table:table-cell>
          <table:table-cell table:style-name="Table1.A1" office:value-type="string">
            <text:p text:style-name="P8">0.8772</text:p>
          </table:table-cell>
          <table:table-cell table:style-name="Table1.A1" office:value-type="string">
            <text:p text:style-name="P8">0.8763</text:p>
          </table:table-cell>
          <table:table-cell table:style-name="Table1.A1" office:value-type="string">
            <text:p text:style-name="P8">0.8783</text:p>
          </table:table-cell>
          <table:table-cell table:style-name="Table1.A1" office:value-type="string">
            <text:p text:style-name="P8">0.8773</text:p>
          </table:table-cell>
        </table:table-row>
        <table:table-row>
          <table:table-cell table:style-name="Table1.A1" office:value-type="string">
            <text:p text:style-name="P8">Multinomial Naive Bayes</text:p>
          </table:table-cell>
          <table:table-cell table:style-name="Table1.A1" office:value-type="string">
            <text:p text:style-name="P8">0.8281</text:p>
          </table:table-cell>
          <table:table-cell table:style-name="Table1.A1" office:value-type="string">
            <text:p text:style-name="P8">0.8547</text:p>
          </table:table-cell>
          <table:table-cell table:style-name="Table1.A1" office:value-type="string">
            <text:p text:style-name="P8">0.7906</text:p>
          </table:table-cell>
          <table:table-cell table:style-name="Table1.A1" office:value-type="string">
            <text:p text:style-name="P8">0.8214</text:p>
          </table:table-cell>
        </table:table-row>
        <table:table-row>
          <table:table-cell table:style-name="Table1.A1" office:value-type="string">
            <text:p text:style-name="P8">Linear SVC</text:p>
          </table:table-cell>
          <table:table-cell table:style-name="Table1.A1" office:value-type="string">
            <text:p text:style-name="P8">0.8593</text:p>
          </table:table-cell>
          <table:table-cell table:style-name="Table1.A1" office:value-type="string">
            <text:p text:style-name="P8">0.8672</text:p>
          </table:table-cell>
          <table:table-cell table:style-name="Table1.A1" office:value-type="string">
            <text:p text:style-name="P8">0.8486</text:p>
          </table:table-cell>
          <table:table-cell table:style-name="Table1.A1" office:value-type="string">
            <text:p text:style-name="P8">0.8578</text:p>
          </table:table-cell>
        </table:table-row>
        <table:table-row>
          <table:table-cell table:style-name="Table1.A1" office:value-type="string">
            <text:p text:style-name="P8">Decision Tree</text:p>
          </table:table-cell>
          <table:table-cell table:style-name="Table1.A1" office:value-type="string">
            <text:p text:style-name="P8">0.7104</text:p>
          </table:table-cell>
          <table:table-cell table:style-name="Table1.A1" office:value-type="string">
            <text:p text:style-name="P8">0.7134</text:p>
          </table:table-cell>
          <table:table-cell table:style-name="Table1.A1" office:value-type="string">
            <text:p text:style-name="P8">0.7032</text:p>
          </table:table-cell>
          <table:table-cell table:style-name="Table1.A1" office:value-type="string">
            <text:p text:style-name="P8">0.7083</text:p>
          </table:table-cell>
        </table:table-row>
      </table:table>
      <text:p text:style-name="Text_20_body">From the results, <text:span text:style-name="Strong_20_Emphasis">Logistic Regression</text:span> emerged as the top-performing model, achieving the highest accuracy, precision, recall, and F1-score. Multinomial Naive Bayes and Linear SVC also demonstrated strong performance, while the Decision Tree Classifier showed comparatively lower performance on this dataset.</text:p>
      <text:h text:style-name="Heading_20_2" text:outline-level="2"><text:soft-page-break/>Conclusion</text:h>
      <text:p text:style-name="Text_20_body">This project successfully demonstrated a complete sentiment analysis pipeline using classical machine learning techniques on the IMDB movie reviews dataset. The process involved comprehensive data preprocessing, effective feature extraction using TF-IDF, and the training and evaluation of multiple classification models. Logistic Regression proved to be the most effective model among those tested, providing a robust solution for binary sentiment classification on this particular dataset.</text:p>
      <text:p text:style-name="Text_20_body">Further improvements could involve exploring more advanced text representation techniques (e.g., word embeddings), experimenting with deep learning models, or fine-tuning hyperparameters for existing models to potentially enhance performanc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4T07:14:28.733406694</meta:creation-date>
    <dc:date>2026-07-24T07:21:32.776329816</dc:date>
    <meta:editing-duration>PT7M5S</meta:editing-duration>
    <meta:editing-cycles>1</meta:editing-cycles>
    <meta:generator>LibreOffice/26.2.4.2$Linux_X86_64 LibreOffice_project/620$Build-2</meta:generator>
    <meta:document-statistic meta:table-count="1" meta:image-count="0" meta:object-count="0" meta:page-count="3" meta:paragraph-count="58" meta:word-count="631" meta:character-count="4545" meta:non-whitespace-character-count="3962"/>
  </office:meta>
</office:document-meta>
</file>